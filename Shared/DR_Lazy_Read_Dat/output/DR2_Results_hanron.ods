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1.787cm"/>
    </style:style>
    <style:style style:name="co2" style:family="table-column">
      <style:table-column-properties fo:break-before="auto" style:column-width="3.445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764cm"/>
    </style:style>
    <style:style style:name="co6" style:family="table-column">
      <style:table-column-properties fo:break-before="auto" style:column-width="2.219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1.584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3.15cm"/>
    </style:style>
    <style:style style:name="co12" style:family="table-column">
      <style:table-column-properties fo:break-before="auto" style:column-width="2.9cm"/>
    </style:style>
    <style:style style:name="co13" style:family="table-column">
      <style:table-column-properties fo:break-before="auto" style:column-width="2.946cm"/>
    </style:style>
    <style:style style:name="co14" style:family="table-column">
      <style:table-column-properties fo:break-before="auto" style:column-width="2.808cm"/>
    </style:style>
    <style:style style:name="co15" style:family="table-column">
      <style:table-column-properties fo:break-before="auto" style:column-width="2.173cm"/>
    </style:style>
    <style:style style:name="co16" style:family="table-column">
      <style:table-column-properties fo:break-before="auto" style:column-width="1.946cm"/>
    </style:style>
    <style:style style:name="co17" style:family="table-column">
      <style:table-column-properties fo:break-before="auto" style:column-width="2.286cm"/>
    </style:style>
    <style:style style:name="co18" style:family="table-column">
      <style:table-column-properties fo:break-before="auto" style:column-width="8.029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5" style:family="table-cell" style:parent-style-name="Default">
      <style:table-cell-properties fo:background-color="#dee6ef"/>
    </style:style>
    <style:style style:name="ce6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6f9d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ackground-color="#f6f9d4"/>
    </style:style>
    <style:style style:name="ce13" style:family="table-cell" style:parent-style-name="Default">
      <style:table-cell-properties fo:background-color="#ffdbb6"/>
    </style:style>
    <style:style style:name="ce14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R2_Results_hanron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8" table:number-columns-repeated="3" table:default-cell-style-name="Default"/>
        <table:table-column table:style-name="co17" table:default-cell-style-name="Default"/>
        <table:table-column table:style-name="co8" table:number-columns-repeated="3" table:default-cell-style-name="Default"/>
        <table:table-column table:style-name="co16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Index</text:p>
            <text:p>InFile</text:p>
          </table:table-cell>
          <table:table-cell table:style-name="ce1" office:value-type="string" calcext:value-type="string">
            <text:p>Unk2</text:p>
            <text:p>(Not Pink</text:p>
            <text:p>Text)</text:p>
          </table:table-cell>
          <table:table-cell table:style-name="ce1" office:value-type="string" calcext:value-type="string">
            <text:p>Unk3 </text:p>
          </table:table-cell>
          <table:table-cell table:style-name="ce1" office:value-type="string" calcext:value-type="string">
            <text:p>TruthBullet</text:p>
            <text:p>ShootID</text:p>
          </table:table-cell>
          <table:table-cell table:style-name="ce1" office:value-type="string" calcext:value-type="string">
            <text:p>Hajimes</text:p>
            <text:p>Text</text:p>
          </table:table-cell>
          <table:table-cell table:style-name="ce1" office:value-type="string" calcext:value-type="string">
            <text:p>Unk6 </text:p>
          </table:table-cell>
          <table:table-cell table:style-name="ce1" office:value-type="string" calcext:value-type="string">
            <text:p>HasShootSpot</text:p>
          </table:table-cell>
          <table:table-cell table:style-name="ce1" office:value-type="string" calcext:value-type="string">
            <text:p>Unk8 </text:p>
          </table:table-cell>
          <table:table-cell table:style-name="ce1" office:value-type="string" calcext:value-type="string">
            <text:p>Unk9 </text:p>
          </table:table-cell>
          <table:table-cell table:style-name="ce1" office:value-type="string" calcext:value-type="string">
            <text:p>Unk10 </text:p>
          </table:table-cell>
          <table:table-cell table:style-name="ce1" office:value-type="string" calcext:value-type="string">
            <text:p>Unk11 </text:p>
          </table:table-cell>
          <table:table-cell table:style-name="ce1" office:value-type="string" calcext:value-type="string">
            <text:p>Unk12 </text:p>
          </table:table-cell>
          <table:table-cell table:style-name="ce1" office:value-type="string" calcext:value-type="string">
            <text:p>Text</text:p>
            <text:p>X</text:p>
          </table:table-cell>
          <table:table-cell table:style-name="ce1" office:value-type="string" calcext:value-type="string">
            <text:p>Text</text:p>
            <text:p>Y</text:p>
          </table:table-cell>
          <table:table-cell table:style-name="ce1" office:value-type="string" calcext:value-type="string">
            <text:p>TextMove</text:p>
            <text:p>Speed</text:p>
          </table:table-cell>
          <table:table-cell table:style-name="ce1" office:value-type="string" calcext:value-type="string">
            <text:p>DirectionText</text:p>
            <text:p>IsGoing</text:p>
            <text:p>(90=Right</text:p>
            <text:p>270=Left)</text:p>
          </table:table-cell>
          <table:table-cell table:style-name="ce1" office:value-type="string" calcext:value-type="string">
            <text:p>Unk17 </text:p>
          </table:table-cell>
          <table:table-cell table:style-name="ce1" office:value-type="string" calcext:value-type="string">
            <text:p>Unk18 </text:p>
          </table:table-cell>
          <table:table-cell table:style-name="ce1" office:value-type="string" calcext:value-type="string">
            <text:p>Unk19 </text:p>
          </table:table-cell>
          <table:table-cell table:style-name="ce1" office:value-type="string" calcext:value-type="string">
            <text:p>Rotation</text:p>
            <text:p>Angle</text:p>
            <text:p>(BottomLeft</text:p>
            <text:p>Anchor)</text:p>
          </table:table-cell>
          <table:table-cell table:style-name="ce1" office:value-type="string" calcext:value-type="string">
            <text:p>ValueToAdd</text:p>
            <text:p>ToAngle</text:p>
          </table:table-cell>
          <table:table-cell table:style-name="ce1" office:value-type="string" calcext:value-type="string">
            <text:p>CharacterID</text:p>
          </table:table-cell>
          <table:table-cell table:style-name="ce1" office:value-type="string" calcext:value-type="string">
            <text:p>Expression</text:p>
          </table:table-cell>
          <table:table-cell table:style-name="ce1" office:value-type="string" calcext:value-type="string">
            <text:p>Camera</text:p>
            <text:p>ID</text:p>
          </table:table-cell>
          <table:table-cell table:style-name="ce1" office:value-type="string" calcext:value-type="string">
            <text:p>Unk25</text:p>
          </table:table-cell>
          <table:table-cell table:style-name="ce1" office:value-type="string" calcext:value-type="string">
            <text:p>Unk26</text:p>
          </table:table-cell>
          <table:table-cell table:style-name="ce1" office:value-type="string" calcext:value-type="string">
            <text:p>Unk27 </text:p>
          </table:table-cell>
          <table:table-cell table:style-name="ce1" office:value-type="string" calcext:value-type="string">
            <text:p>Unk28 </text:p>
          </table:table-cell>
          <table:table-cell table:style-name="ce1" office:value-type="string" calcext:value-type="string">
            <text:p>Unk29 </text:p>
          </table:table-cell>
          <table:table-cell table:style-name="ce1" office:value-type="string" calcext:value-type="string">
            <text:p>Unk30</text:p>
          </table:table-cell>
          <table:table-cell table:style-name="ce1" office:value-type="string" calcext:value-type="string">
            <text:p>Unk31 </text:p>
          </table:table-cell>
          <table:table-cell table:style-name="ce1" office:value-type="string" calcext:value-type="string">
            <text:p>Unk32 </text:p>
          </table:table-cell>
          <table:table-cell table:style-name="ce1" office:value-type="string" calcext:value-type="string">
            <text:p>Unk33 </text:p>
          </table:table-cell>
          <table:table-cell table:style-name="ce1" office:value-type="string" calcext:value-type="string">
            <text:p>Unk34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anron_01_001.da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180" calcext:value-type="float">
            <text:p>180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0" calcext:value-type="float">
            <text:p>9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54" calcext:value-type="float">
            <text:p>654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10" calcext:value-type="float">
            <text:p>-1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hanron_01_001.da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hanron_01_001.da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68" calcext:value-type="float">
            <text:p>66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hanron_01_001.da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hanron_01_001.da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748" calcext:value-type="float">
            <text:p>74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hanron_01_001.dat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54" calcext:value-type="float">
            <text:p>654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hanron_01_001.dat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hanron_01_001.dat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54" calcext:value-type="float">
            <text:p>65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hanron_01_001.dat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hanron_01_001.dat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668" calcext:value-type="float">
            <text:p>66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hanron_01_001.dat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54" calcext:value-type="float">
            <text:p>654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hanron_01_001.dat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4" calcext:value-type="float">
            <text:p>7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hanron_01_001.dat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68" calcext:value-type="float">
            <text:p>668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hanron_01_001.dat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80" calcext:value-type="float">
            <text:p>180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90" calcext:value-type="float">
            <text:p>90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32" calcext:value-type="float">
            <text:p>232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hanron_01_001.d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80" calcext:value-type="float">
            <text:p>18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hanron_01_002.da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150" calcext:value-type="float">
            <text:p>15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54" calcext:value-type="float">
            <text:p>654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5" calcext:value-type="float">
            <text:p>-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hanron_01_002.da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hanron_01_002.da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hanron_01_002.da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4" calcext:value-type="float">
            <text:p>7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hanron_01_002.da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32" calcext:value-type="float">
            <text:p>23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hanron_01_002.dat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hanron_01_002.dat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hanron_01_002.dat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hanron_01_002.dat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4" calcext:value-type="float">
            <text:p>7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hanron_01_002.dat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hanron_01_002.dat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32" calcext:value-type="float">
            <text:p>23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hanron_01_002.dat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hanron_01_002.dat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1" calcext:value-type="float">
            <text:p>-1</text:p>
          </table:table-cell>
          <table:table-cell table:style-name="ce12" office:value-type="float" office:value="748" calcext:value-type="float">
            <text:p>748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hanron_01_002.dat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54" calcext:value-type="float">
            <text:p>654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hanron_01_002.dat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hanron_01_002.dat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80" calcext:value-type="float">
            <text:p>180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hanron_01_002.dat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hanron_01_002.dat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32" calcext:value-type="float">
            <text:p>23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hanron_01_002.dat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hanron_01_002.dat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hanron_01_002.da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hanron_01_002.dat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32" calcext:value-type="float">
            <text:p>23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hanron_01_002.dat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80" calcext:value-type="float">
            <text:p>18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hanron_01_003.da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180" calcext:value-type="float">
            <text:p>18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0" calcext:value-type="float">
            <text:p>9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54" calcext:value-type="float">
            <text:p>654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3" calcext:value-type="float">
            <text:p>-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hanron_01_003.da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hanron_01_003.da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hanron_01_003.da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hanron_01_003.da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hanron_01_003.dat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hanron_01_003.dat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hanron_01_003.dat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hanron_01_003.dat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hanron_01_003.dat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hanron_01_003.dat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7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hanron_01_003.dat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hanron_01_003.dat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hanron_01_003.dat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hanron_01_003.dat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hanron_01_003.dat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5" office:value-type="string" calcext:value-type="string">
            <text:p>hanron_01_003.dat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-1" calcext:value-type="float">
            <text:p>-1</text:p>
          </table:table-cell>
          <table:table-cell table:style-name="ce12" office:value-type="float" office:value="748" calcext:value-type="float">
            <text:p>748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hanron_01_003.dat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7" office:value-type="float" office:value="160" calcext:value-type="float">
            <text:p>1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54" calcext:value-type="float">
            <text:p>654</text:p>
          </table:table-cell>
          <table:table-cell office:value-type="float" office:value="169" calcext:value-type="float">
            <text:p>169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hanron_01_003.dat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hanron_01_003.dat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80" calcext:value-type="float">
            <text:p>28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hanron_01_003.da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60" calcext:value-type="float">
            <text:p>26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hanron_01_003.dat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0" calcext:value-type="float">
            <text:p>210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32" calcext:value-type="float">
            <text:p>23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hanron_01_003.dat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0" calcext:value-type="float">
            <text:p>180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190" calcext:value-type="float">
            <text:p>19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3" calcext:value-type="float">
            <text:p>-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5" calcext:value-type="float">
            <text:p>55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hanron_01_003.dat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7" office:value-type="float" office:value="140" calcext:value-type="float">
            <text:p>1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hanron_01_003.dat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hanron_01_003.dat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80" calcext:value-type="float">
            <text:p>18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hanron_02_001.da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180" calcext:value-type="float">
            <text:p>180</text:p>
          </table:table-cell>
          <table:table-cell table:style-name="ce6" office:value-type="float" office:value="440" calcext:value-type="float">
            <text:p>44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270" calcext:value-type="float">
            <text:p>2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47" calcext:value-type="float">
            <text:p>447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7" calcext:value-type="float">
            <text:p>-7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hanron_02_001.da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2" calcext:value-type="float">
            <text:p>322</text:p>
          </table:table-cell>
          <table:table-cell office:value-type="float" office:value="-1" calcext:value-type="float">
            <text:p>-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hanron_02_001.da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42" calcext:value-type="float">
            <text:p>342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hanron_02_001.da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5" office:value-type="string" calcext:value-type="string">
            <text:p>hanron_02_001.da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hanron_02_001.dat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80" calcext:value-type="float">
            <text:p>18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5" office:value-type="string" calcext:value-type="string">
            <text:p>hanron_02_001.dat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80" calcext:value-type="float">
            <text:p>18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-1" calcext:value-type="float">
            <text:p>-1</text:p>
          </table:table-cell>
          <table:table-cell table:style-name="ce12" office:value-type="float" office:value="748" calcext:value-type="float">
            <text:p>748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hanron_02_001.dat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45" calcext:value-type="float">
            <text:p>745</text:p>
          </table:table-cell>
          <table:table-cell office:value-type="float" office:value="169" calcext:value-type="float">
            <text:p>16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5" office:value-type="string" calcext:value-type="string">
            <text:p>hanron_02_001.dat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440" calcext:value-type="float">
            <text:p>4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22" calcext:value-type="float">
            <text:p>322</text:p>
          </table:table-cell>
          <table:table-cell office:value-type="float" office:value="-1" calcext:value-type="float">
            <text:p>-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hanron_02_001.dat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42" calcext:value-type="float">
            <text:p>342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5" office:value-type="string" calcext:value-type="string">
            <text:p>hanron_02_001.da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6" calcext:value-type="float">
            <text:p>36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80" calcext:value-type="float">
            <text:p>18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90" calcext:value-type="float">
            <text:p>9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47" calcext:value-type="float">
            <text:p>447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5" office:value-type="string" calcext:value-type="string">
            <text:p>hanron_02_001.dat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hanron_02_001.dat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80" calcext:value-type="float">
            <text:p>180</text:p>
          </table:table-cell>
          <table:table-cell table:style-name="ce9" office:value-type="float" office:value="440" calcext:value-type="float">
            <text:p>44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270" calcext:value-type="float">
            <text:p>27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45" calcext:value-type="float">
            <text:p>445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hanron_02_001.dat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5" office:value-type="string" calcext:value-type="string">
            <text:p>hanron_02_001.d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80" calcext:value-type="float">
            <text:p>18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hanron_02_002.da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120" calcext:value-type="float">
            <text:p>120</text:p>
          </table:table-cell>
          <table:table-cell table:style-name="ce6" office:value-type="float" office:value="480" calcext:value-type="float">
            <text:p>48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270" calcext:value-type="float">
            <text:p>27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0" calcext:value-type="float">
            <text:p>450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6" calcext:value-type="float">
            <text:p>-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5" office:value-type="string" calcext:value-type="string">
            <text:p>hanron_02_002.da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16" calcext:value-type="float">
            <text:p>416</text:p>
          </table:table-cell>
          <table:table-cell office:value-type="float" office:value="-1" calcext:value-type="float">
            <text:p>-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5" office:value-type="string" calcext:value-type="string">
            <text:p>hanron_02_002.da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5" office:value-type="string" calcext:value-type="string">
            <text:p>hanron_02_002.da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hanron_02_002.da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46" calcext:value-type="float">
            <text:p>746</text:p>
          </table:table-cell>
          <table:table-cell office:value-type="float" office:value="-1" calcext:value-type="float">
            <text:p>-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5" office:value-type="string" calcext:value-type="string">
            <text:p>hanron_02_002.dat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50" calcext:value-type="float">
            <text:p>15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hanron_02_002.dat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50" calcext:value-type="float">
            <text:p>15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-1" calcext:value-type="float">
            <text:p>-1</text:p>
          </table:table-cell>
          <table:table-cell table:style-name="ce12" office:value-type="float" office:value="748" calcext:value-type="float">
            <text:p>748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hanron_02_002.dat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46" calcext:value-type="float">
            <text:p>446</text:p>
          </table:table-cell>
          <table:table-cell office:value-type="float" office:value="169" calcext:value-type="float">
            <text:p>16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hanron_02_002.dat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80" calcext:value-type="float">
            <text:p>18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0" calcext:value-type="float">
            <text:p>11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27" calcext:value-type="float">
            <text:p>327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5" office:value-type="string" calcext:value-type="string">
            <text:p>hanron_02_002.dat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2"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5" office:value-type="string" calcext:value-type="string">
            <text:p>hanron_02_002.dat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7" office:value-type="float" office:value="140" calcext:value-type="float">
            <text:p>1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91" calcext:value-type="float">
            <text:p>691</text:p>
          </table:table-cell>
          <table:table-cell office:value-type="float" office:value="-1" calcext:value-type="float">
            <text:p>-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5" office:value-type="string" calcext:value-type="string">
            <text:p>hanron_02_002.dat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5" office:value-type="string" calcext:value-type="string">
            <text:p>hanron_02_002.dat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80" calcext:value-type="float">
            <text:p>18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70" calcext:value-type="float">
            <text:p>7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340" calcext:value-type="float">
            <text:p>3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83" calcext:value-type="float">
            <text:p>383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5" office:value-type="string" calcext:value-type="string">
            <text:p>hanron_02_002.dat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39" calcext:value-type="float">
            <text:p>439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5" office:value-type="string" calcext:value-type="string">
            <text:p>hanron_02_002.dat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5" office:value-type="string" calcext:value-type="string">
            <text:p>hanron_02_002.dat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50" calcext:value-type="float">
            <text:p>15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748" calcext:value-type="float">
            <text:p>748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hanron_03_001.da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10" calcext:value-type="float">
            <text:p>21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90" calcext:value-type="float">
            <text:p>9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44" calcext:value-type="float">
            <text:p>344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10" calcext:value-type="float">
            <text:p>-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5" office:value-type="string" calcext:value-type="string">
            <text:p>hanron_03_001.da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5" office:value-type="string" calcext:value-type="string">
            <text:p>hanron_03_001.da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5" office:value-type="string" calcext:value-type="string">
            <text:p>hanron_03_001.da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0" calcext:value-type="float">
            <text:p>180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0" calcext:value-type="float">
            <text:p>180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445" calcext:value-type="float">
            <text:p>445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hanron_03_001.da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23" calcext:value-type="float">
            <text:p>323</text:p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5" office:value-type="string" calcext:value-type="string">
            <text:p>hanron_03_001.dat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5" office:value-type="string" calcext:value-type="string">
            <text:p>hanron_03_001.dat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46" calcext:value-type="float">
            <text:p>746</text:p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5" office:value-type="string" calcext:value-type="string">
            <text:p>hanron_03_001.dat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5" office:value-type="string" calcext:value-type="string">
            <text:p>hanron_03_001.dat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-1" calcext:value-type="float">
            <text:p>-1</text:p>
          </table:table-cell>
          <table:table-cell table:style-name="ce12" office:value-type="float" office:value="748" calcext:value-type="float">
            <text:p>748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5" office:value-type="string" calcext:value-type="string">
            <text:p>hanron_03_001.dat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21" calcext:value-type="float">
            <text:p>421</text:p>
          </table:table-cell>
          <table:table-cell office:value-type="float" office:value="169" calcext:value-type="float">
            <text:p>16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5" office:value-type="string" calcext:value-type="string">
            <text:p>hanron_03_001.dat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5" office:value-type="string" calcext:value-type="string">
            <text:p>hanron_03_001.dat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5" office:value-type="string" calcext:value-type="string">
            <text:p>hanron_03_001.dat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5" office:value-type="string" calcext:value-type="string">
            <text:p>hanron_03_001.dat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220" calcext:value-type="float">
            <text:p>22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69" calcext:value-type="float">
            <text:p>16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5" office:value-type="string" calcext:value-type="string">
            <text:p>hanron_03_001.dat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29" calcext:value-type="float">
            <text:p>429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5" office:value-type="string" calcext:value-type="string">
            <text:p>hanron_03_001.dat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5" office:value-type="string" calcext:value-type="string">
            <text:p>hanron_03_001.dat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5" office:value-type="string" calcext:value-type="string">
            <text:p>hanron_03_001.dat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5" office:value-type="string" calcext:value-type="string">
            <text:p>hanron_03_001.dat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5" office:value-type="string" calcext:value-type="string">
            <text:p>hanron_03_001.dat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hanron_03_002.da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10" calcext:value-type="float">
            <text:p>210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32" calcext:value-type="float">
            <text:p>332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9" calcext:value-type="float">
            <text:p>-9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90" calcext:value-type="float">
            <text:p>19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-5" calcext:value-type="float">
            <text:p>-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46" calcext:value-type="float">
            <text:p>746</text:p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480" calcext:value-type="float">
            <text:p>480</text:p>
          </table:table-cell>
          <table:table-cell table:number-columns-repeated="2" table:style-name="ce7" office:value-type="float" office:value="140" calcext:value-type="float">
            <text:p>14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-5" calcext:value-type="float">
            <text:p>-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5" office:value-type="string" calcext:value-type="string">
            <text:p>hanron_03_002.dat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729" calcext:value-type="float">
            <text:p>729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5" office:value-type="string" calcext:value-type="string">
            <text:p>hanron_03_002.dat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1" calcext:value-type="float">
            <text:p>-1</text:p>
          </table:table-cell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5" office:value-type="string" calcext:value-type="string">
            <text:p>hanron_03_002.dat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-1" calcext:value-type="float">
            <text:p>-1</text:p>
          </table:table-cell>
          <table:table-cell table:style-name="ce12" office:value-type="float" office:value="748" calcext:value-type="float">
            <text:p>748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-60" calcext:value-type="float">
            <text:p>-6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63" calcext:value-type="float">
            <text:p>363</text:p>
          </table:table-cell>
          <table:table-cell office:value-type="float" office:value="169" calcext:value-type="float">
            <text:p>16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-20" calcext:value-type="float">
            <text:p>-20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-20" calcext:value-type="float">
            <text:p>-20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-60" calcext:value-type="float">
            <text:p>-6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5" office:value-type="string" calcext:value-type="string">
            <text:p>hanron_03_002.dat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5" office:value-type="string" calcext:value-type="string">
            <text:p>hanron_03_002.da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-1" calcext:value-type="float">
            <text:p>-1</text:p>
          </table:table-cell>
          <table:table-cell table:style-name="ce12" office:value-type="float" office:value="748" calcext:value-type="float">
            <text:p>748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5" office:value-type="string" calcext:value-type="string">
            <text:p>hanron_03_002.dat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0" calcext:value-type="float">
            <text:p>210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64" calcext:value-type="float">
            <text:p>364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33" calcext:value-type="float">
            <text:p>433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-20" calcext:value-type="float">
            <text:p>-20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90" calcext:value-type="float">
            <text:p>19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7" office:value-type="float" office:value="300" calcext:value-type="float">
            <text:p>300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-20" calcext:value-type="float">
            <text:p>-20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90" calcext:value-type="float">
            <text:p>19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5" office:value-type="string" calcext:value-type="string">
            <text:p>hanron_03_002.dat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0" calcext:value-type="float">
            <text:p>210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746" calcext:value-type="float">
            <text:p>746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80" calcext:value-type="float">
            <text:p>28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5" office:value-type="string" calcext:value-type="string">
            <text:p>hanron_03_002.dat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5" office:value-type="string" calcext:value-type="string">
            <text:p>hanron_03_002.dat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80" calcext:value-type="float">
            <text:p>18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4" office:value-type="string" calcext:value-type="string">
            <text:p>hanron_04_001.da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20" calcext:value-type="float">
            <text:p>42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54" calcext:value-type="float">
            <text:p>654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10" calcext:value-type="float">
            <text:p>-1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5" office:value-type="string" calcext:value-type="string">
            <text:p>hanron_04_001.da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5" office:value-type="string" calcext:value-type="string">
            <text:p>hanron_04_001.da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40" calcext:value-type="float">
            <text:p>2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5" office:value-type="string" calcext:value-type="string">
            <text:p>hanron_04_001.da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5" office:value-type="string" calcext:value-type="string">
            <text:p>hanron_04_001.da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36" calcext:value-type="float">
            <text:p>13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50" calcext:value-type="float">
            <text:p>350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46" calcext:value-type="float">
            <text:p>746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5" office:value-type="string" calcext:value-type="string">
            <text:p>hanron_04_001.dat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232" calcext:value-type="float">
            <text:p>23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5" office:value-type="string" calcext:value-type="string">
            <text:p>hanron_04_001.dat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-1" calcext:value-type="float">
            <text:p>-1</text:p>
          </table:table-cell>
          <table:table-cell table:style-name="ce12" office:value-type="float" office:value="748" calcext:value-type="float">
            <text:p>74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5" office:value-type="string" calcext:value-type="string">
            <text:p>hanron_04_001.dat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22" calcext:value-type="float">
            <text:p>322</text:p>
          </table:table-cell>
          <table:table-cell office:value-type="float" office:value="169" calcext:value-type="float">
            <text:p>16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5" office:value-type="string" calcext:value-type="string">
            <text:p>hanron_04_001.dat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5" office:value-type="string" calcext:value-type="string">
            <text:p>hanron_04_001.dat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5" office:value-type="string" calcext:value-type="string">
            <text:p>hanron_04_001.dat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5" office:value-type="string" calcext:value-type="string">
            <text:p>hanron_04_001.dat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0" calcext:value-type="float">
            <text:p>210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0" calcext:value-type="float">
            <text:p>18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19" calcext:value-type="float">
            <text:p>219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5" office:value-type="string" calcext:value-type="string">
            <text:p>hanron_04_001.dat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0" calcext:value-type="float">
            <text:p>240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0" calcext:value-type="float">
            <text:p>18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-5" calcext:value-type="float">
            <text:p>-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730" calcext:value-type="float">
            <text:p>73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5" office:value-type="string" calcext:value-type="string">
            <text:p>hanron_04_001.dat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5" office:value-type="string" calcext:value-type="string">
            <text:p>hanron_04_001.dat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5" office:value-type="string" calcext:value-type="string">
            <text:p>hanron_04_001.dat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80" calcext:value-type="float">
            <text:p>18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4" office:value-type="string" calcext:value-type="string">
            <text:p>hanron_04_002.da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150" calcext:value-type="float">
            <text:p>150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70" calcext:value-type="float">
            <text:p>27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29" calcext:value-type="float">
            <text:p>729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5" calcext:value-type="float">
            <text:p>-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7" office:value-type="float" office:value="240" calcext:value-type="float">
            <text:p>2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30" calcext:value-type="float">
            <text:p>230</text:p>
          </table:table-cell>
          <table:table-cell office:value-type="float" office:value="170" calcext:value-type="float">
            <text:p>17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46" calcext:value-type="float">
            <text:p>746</text:p>
          </table:table-cell>
          <table:table-cell office:value-type="float" office:value="-1" calcext:value-type="float">
            <text:p>-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5" office:value-type="string" calcext:value-type="string">
            <text:p>hanron_04_002.dat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232" calcext:value-type="float">
            <text:p>232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5" office:value-type="string" calcext:value-type="string">
            <text:p>hanron_04_002.dat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-1" calcext:value-type="float">
            <text:p>-1</text:p>
          </table:table-cell>
          <table:table-cell table:style-name="ce12" office:value-type="float" office:value="748" calcext:value-type="float">
            <text:p>748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5" office:value-type="string" calcext:value-type="string">
            <text:p>hanron_04_002.dat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20" calcext:value-type="float">
            <text:p>22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80" calcext:value-type="float">
            <text:p>180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383" calcext:value-type="float">
            <text:p>383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5" office:value-type="string" calcext:value-type="string">
            <text:p>hanron_04_002.dat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105" calcext:value-type="float">
            <text:p>105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0" calcext:value-type="float">
            <text:p>210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669" calcext:value-type="float">
            <text:p>669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460" calcext:value-type="float">
            <text:p>46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46" calcext:value-type="float">
            <text:p>446</text:p>
          </table:table-cell>
          <table:table-cell office:value-type="float" office:value="-1" calcext:value-type="float">
            <text:p>-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7" office:value-type="float" office:value="80" calcext:value-type="float">
            <text:p>8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46" calcext:value-type="float">
            <text:p>746</text:p>
          </table:table-cell>
          <table:table-cell office:value-type="float" office:value="-1" calcext:value-type="float">
            <text:p>-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88" calcext:value-type="float">
            <text:p>688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31" calcext:value-type="float">
            <text:p>331</text:p>
          </table:table-cell>
          <table:table-cell office:value-type="float" office:value="-1" calcext:value-type="float">
            <text:p>-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440" calcext:value-type="float">
            <text:p>4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table:style-name="ce7"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440" calcext:value-type="float">
            <text:p>44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300" calcext:value-type="float">
            <text:p>30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hanron_04_002.dat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00" calcext:value-type="float">
            <text:p>2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5" office:value-type="string" calcext:value-type="string">
            <text:p>hanron_04_002.dat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80" calcext:value-type="float">
            <text:p>18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4" office:value-type="string" calcext:value-type="string">
            <text:p>hanron_04_003.da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0" calcext:value-type="float">
            <text:p>18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6" calcext:value-type="float">
            <text:p>206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3" calcext:value-type="float">
            <text:p>-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80" calcext:value-type="float">
            <text:p>-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80" calcext:value-type="float">
            <text:p>-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220" calcext:value-type="float">
            <text:p>22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20" calcext:value-type="float">
            <text:p>22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80" calcext:value-type="float">
            <text:p>-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20" calcext:value-type="float">
            <text:p>22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80" calcext:value-type="float">
            <text:p>-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80" calcext:value-type="float">
            <text:p>-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80" calcext:value-type="float">
            <text:p>-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80" calcext:value-type="float">
            <text:p>-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20" calcext:value-type="float">
            <text:p>22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20" calcext:value-type="float">
            <text:p>22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80" calcext:value-type="float">
            <text:p>-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220" calcext:value-type="float">
            <text:p>22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46" calcext:value-type="float">
            <text:p>746</text:p>
          </table:table-cell>
          <table:table-cell office:value-type="float" office:value="-1" calcext:value-type="float">
            <text:p>-1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80" calcext:value-type="float">
            <text:p>-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5" office:value-type="string" calcext:value-type="string">
            <text:p>hanron_04_003.dat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232" calcext:value-type="float">
            <text:p>232</text:p>
          </table:table-cell>
          <table:table-cell table:style-name="ce12" office:value-type="float" office:value="151" calcext:value-type="float">
            <text:p>15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5" office:value-type="string" calcext:value-type="string">
            <text:p>hanron_04_003.da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-1" calcext:value-type="float">
            <text:p>-1</text:p>
          </table:table-cell>
          <table:table-cell table:style-name="ce12" office:value-type="float" office:value="748" calcext:value-type="float">
            <text:p>748</text:p>
          </table:table-cell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64" calcext:value-type="float">
            <text:p>364</text:p>
          </table:table-cell>
          <table:table-cell office:value-type="float" office:value="169" calcext:value-type="float">
            <text:p>169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85" calcext:value-type="float">
            <text:p>685</text:p>
          </table:table-cell>
          <table:table-cell office:value-type="float" office:value="-1" calcext:value-type="float">
            <text:p>-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5" office:value-type="string" calcext:value-type="string">
            <text:p>hanron_04_003.dat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80" calcext:value-type="float">
            <text:p>180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270" calcext:value-type="float">
            <text:p>27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414" calcext:value-type="float">
            <text:p>414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5" office:value-type="string" calcext:value-type="string">
            <text:p>hanron_04_003.dat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5" office:value-type="string" calcext:value-type="string">
            <text:p>hanron_04_003.dat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80" calcext:value-type="float">
            <text:p>18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4" office:value-type="string" calcext:value-type="string">
            <text:p>hanron_05_001.da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10" calcext:value-type="float">
            <text:p>210</text:p>
          </table:table-cell>
          <table:table-cell table:number-columns-repeated="2" table:style-name="ce6" office:value-type="float" office:value="60" calcext:value-type="float">
            <text:p>6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51" calcext:value-type="float">
            <text:p>351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10" calcext:value-type="float">
            <text:p>-1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5" office:value-type="string" calcext:value-type="string">
            <text:p>hanron_05_001.da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23" calcext:value-type="float">
            <text:p>32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5" office:value-type="string" calcext:value-type="string">
            <text:p>hanron_05_001.da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40" calcext:value-type="float">
            <text:p>34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5" office:value-type="string" calcext:value-type="string">
            <text:p>hanron_05_001.da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5" office:value-type="string" calcext:value-type="string">
            <text:p>hanron_05_001.da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46" calcext:value-type="float">
            <text:p>746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5" office:value-type="string" calcext:value-type="string">
            <text:p>hanron_05_001.dat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5" office:value-type="string" calcext:value-type="string">
            <text:p>hanron_05_001.dat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421" calcext:value-type="float">
            <text:p>42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5" office:value-type="string" calcext:value-type="string">
            <text:p>hanron_05_001.dat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1" calcext:value-type="float">
            <text:p>-1</text:p>
          </table:table-cell>
          <table:table-cell table:style-name="ce12" office:value-type="float" office:value="748" calcext:value-type="float">
            <text:p>74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5" office:value-type="string" calcext:value-type="string">
            <text:p>hanron_05_001.dat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54" calcext:value-type="float">
            <text:p>654</text:p>
          </table:table-cell>
          <table:table-cell office:value-type="float" office:value="169" calcext:value-type="float">
            <text:p>16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5" office:value-type="string" calcext:value-type="string">
            <text:p>hanron_05_001.dat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5" office:value-type="string" calcext:value-type="string">
            <text:p>hanron_05_001.da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00" calcext:value-type="float">
            <text:p>20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80" calcext:value-type="float">
            <text:p>80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83" calcext:value-type="float">
            <text:p>383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hanron_05_001.dat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125" calcext:value-type="float">
            <text:p>125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00" calcext:value-type="float">
            <text:p>20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100" calcext:value-type="float">
            <text:p>100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68" calcext:value-type="float">
            <text:p>668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5" office:value-type="string" calcext:value-type="string">
            <text:p>hanron_05_001.dat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00" calcext:value-type="float">
            <text:p>20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90" calcext:value-type="float">
            <text:p>90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19" calcext:value-type="float">
            <text:p>219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5" office:value-type="string" calcext:value-type="string">
            <text:p>hanron_05_001.dat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31" calcext:value-type="float">
            <text:p>331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5" office:value-type="string" calcext:value-type="string">
            <text:p>hanron_05_001.dat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5" office:value-type="string" calcext:value-type="string">
            <text:p>hanron_05_001.dat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80" calcext:value-type="float">
            <text:p>18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4" office:value-type="string" calcext:value-type="string">
            <text:p>hanron_05_002.da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80" calcext:value-type="float">
            <text:p>48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54" calcext:value-type="float">
            <text:p>654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12" calcext:value-type="float">
            <text:p>-1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5" office:value-type="string" calcext:value-type="string">
            <text:p>hanron_05_002.da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5" office:value-type="string" calcext:value-type="string">
            <text:p>hanron_05_002.da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5" office:value-type="string" calcext:value-type="string">
            <text:p>hanron_05_002.da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10" calcext:value-type="float">
            <text:p>21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7" calcext:value-type="float">
            <text:p>97</text:p>
          </table:table-cell>
          <table:table-cell office:value-type="float" office:value="-1" calcext:value-type="float">
            <text:p>-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5" office:value-type="string" calcext:value-type="string">
            <text:p>hanron_05_002.da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36" calcext:value-type="float">
            <text:p>13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746" calcext:value-type="float">
            <text:p>746</text:p>
          </table:table-cell>
          <table:table-cell office:value-type="float" office:value="-1" calcext:value-type="float">
            <text:p>-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hanron_05_002.dat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729" calcext:value-type="float">
            <text:p>729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5" office:value-type="string" calcext:value-type="string">
            <text:p>hanron_05_002.dat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-1" calcext:value-type="float">
            <text:p>-1</text:p>
          </table:table-cell>
          <table:table-cell table:style-name="ce12" office:value-type="float" office:value="421" calcext:value-type="float">
            <text:p>421</text:p>
          </table:table-cell>
          <table:table-cell table:style-name="ce12" office:value-type="float" office:value="241" calcext:value-type="float">
            <text:p>24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5" office:value-type="string" calcext:value-type="string">
            <text:p>hanron_05_002.dat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10" calcext:value-type="float">
            <text:p>21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-1" calcext:value-type="float">
            <text:p>-1</text:p>
          </table:table-cell>
          <table:table-cell table:style-name="ce12" office:value-type="float" office:value="748" calcext:value-type="float">
            <text:p>748</text:p>
          </table:table-cell>
          <table:table-cell table:style-name="ce12" office:value-type="float" office:value="242" calcext:value-type="float">
            <text:p>2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5" office:value-type="string" calcext:value-type="string">
            <text:p>hanron_05_002.dat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54" calcext:value-type="float">
            <text:p>654</text:p>
          </table:table-cell>
          <table:table-cell office:value-type="float" office:value="169" calcext:value-type="float">
            <text:p>169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5" office:value-type="string" calcext:value-type="string">
            <text:p>hanron_05_002.dat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654" calcext:value-type="float">
            <text:p>654</text:p>
          </table:table-cell>
          <table:table-cell office:value-type="float" office:value="-1" calcext:value-type="float">
            <text:p>-1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5" office:value-type="string" calcext:value-type="string">
            <text:p>hanron_05_002.dat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5" office:value-type="string" calcext:value-type="string">
            <text:p>hanron_05_002.dat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5" office:value-type="string" calcext:value-type="string">
            <text:p>hanron_05_002.dat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30" calcext:value-type="float">
            <text:p>630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190" calcext:value-type="float">
            <text:p>19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0" calcext:value-type="float">
            <text:p>-1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5" office:value-type="string" calcext:value-type="string">
            <text:p>hanron_05_002.dat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90" calcext:value-type="float">
            <text:p>19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5" office:value-type="string" calcext:value-type="string">
            <text:p>hanron_05_002.dat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133" calcext:value-type="float">
            <text:p>133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20" calcext:value-type="float">
            <text:p>42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0" calcext:value-type="float">
            <text:p>-1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468" calcext:value-type="float">
            <text:p>468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5" office:value-type="string" calcext:value-type="string">
            <text:p>hanron_05_002.dat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5" office:value-type="string" calcext:value-type="string">
            <text:p>hanron_05_002.dat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746" calcext:value-type="float">
            <text:p>746</text:p>
          </table:table-cell>
          <table:table-cell office:value-type="float" office:value="-1" calcext:value-type="float">
            <text:p>-1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5" office:value-type="string" calcext:value-type="string">
            <text:p>hanron_05_002.dat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80" calcext:value-type="float">
            <text:p>18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4" office:value-type="string" calcext:value-type="string">
            <text:p>hanron_06_001.da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180" calcext:value-type="float">
            <text:p>18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54" calcext:value-type="float">
            <text:p>654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3" calcext:value-type="float">
            <text:p>-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5" office:value-type="string" calcext:value-type="string">
            <text:p>hanron_06_001.da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5" office:value-type="string" calcext:value-type="string">
            <text:p>hanron_06_001.da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15" calcext:value-type="float">
            <text:p>3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5" office:value-type="string" calcext:value-type="string">
            <text:p>hanron_06_001.da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15" calcext:value-type="float">
            <text:p>3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30" calcext:value-type="float">
            <text:p>230</text:p>
          </table:table-cell>
          <table:table-cell office:value-type="float" office:value="169" calcext:value-type="float">
            <text:p>16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15" calcext:value-type="float">
            <text:p>3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46" calcext:value-type="float">
            <text:p>746</text:p>
          </table:table-cell>
          <table:table-cell office:value-type="float" office:value="149" calcext:value-type="float">
            <text:p>149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15" calcext:value-type="float">
            <text:p>3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42" calcext:value-type="float">
            <text:p>442</text:p>
          </table:table-cell>
          <table:table-cell office:value-type="float" office:value="169" calcext:value-type="float">
            <text:p>169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15" calcext:value-type="float">
            <text:p>3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20" calcext:value-type="float">
            <text:p>420</text:p>
          </table:table-cell>
          <table:table-cell office:value-type="float" office:value="149" calcext:value-type="float">
            <text:p>149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15" calcext:value-type="float">
            <text:p>3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30" calcext:value-type="float">
            <text:p>230</text:p>
          </table:table-cell>
          <table:table-cell office:value-type="float" office:value="169" calcext:value-type="float">
            <text:p>169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15" calcext:value-type="float">
            <text:p>3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46" calcext:value-type="float">
            <text:p>746</text:p>
          </table:table-cell>
          <table:table-cell office:value-type="float" office:value="149" calcext:value-type="float">
            <text:p>149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15" calcext:value-type="float">
            <text:p>3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5" office:value-type="string" calcext:value-type="string">
            <text:p>hanron_06_001.dat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20" calcext:value-type="float">
            <text:p>12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731" calcext:value-type="float">
            <text:p>73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20" calcext:value-type="float">
            <text:p>22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5" office:value-type="string" calcext:value-type="string">
            <text:p>hanron_06_001.dat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20" calcext:value-type="float">
            <text:p>22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5" office:value-type="string" calcext:value-type="string">
            <text:p>hanron_06_001.dat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float" office:value="170" calcext:value-type="float">
            <text:p>170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40" calcext:value-type="float">
            <text:p>240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136" calcext:value-type="float">
            <text:p>13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8" calcext:value-type="float">
            <text:p>18</text:p>
          </table:table-cell>
          <table:table-cell table:style-name="ce9" office:value-type="float" office:value="226" calcext:value-type="float">
            <text:p>226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9" calcext:value-type="float">
            <text:p>9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5" office:value-type="string" calcext:value-type="string">
            <text:p>hanron_06_001.dat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20" calcext:value-type="float">
            <text:p>12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731" calcext:value-type="float">
            <text:p>73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ilence mortals, Hajime is speaking</text:p>
          </table:table-cell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4" office:value-type="string" calcext:value-type="string">
            <text:p>hanron_14_003.da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240" calcext:value-type="float">
            <text:p>24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40" calcext:value-type="float">
            <text:p>240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70" calcext:value-type="float">
            <text:p>2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7" calcext:value-type="float">
            <text:p>157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20" calcext:value-type="float">
            <text:p>-2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-1" calcext:value-type="float">
            <text:p>-1</text:p>
          </table:table-cell>
          <table:table-cell office:value-type="string" calcext:value-type="string">
            <text:p>UNUSED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5" office:value-type="string" calcext:value-type="string">
            <text:p>hanron_14_003.da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1" calcext:value-type="float">
            <text:p>181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NUSED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5" office:value-type="string" calcext:value-type="string">
            <text:p>hanron_14_003.dat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40" calcext:value-type="float">
            <text:p>24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40" calcext:value-type="float">
            <text:p>24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57" calcext:value-type="float">
            <text:p>157</text:p>
          </table:table-cell>
          <table:table-cell table:style-name="ce12" office:value-type="float" office:value="157" calcext:value-type="float">
            <text:p>15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UNUSED – Silence mortals, Hajime is speaking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5" office:value-type="string" calcext:value-type="string">
            <text:p>hanron_14_003.da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40" calcext:value-type="float">
            <text:p>24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40" calcext:value-type="float">
            <text:p>24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57" calcext:value-type="float">
            <text:p>157</text:p>
          </table:table-cell>
          <table:table-cell table:style-name="ce12" office:value-type="float" office:value="157" calcext:value-type="float">
            <text:p>15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UNUSED – Silence mortals, Hajime is speaking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5" office:value-type="string" calcext:value-type="string">
            <text:p>hanron_14_003.da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1" calcext:value-type="float">
            <text:p>181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NUSED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5" office:value-type="string" calcext:value-type="string">
            <text:p>hanron_14_003.da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0" calcext:value-type="float">
            <text:p>240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160" calcext:value-type="float">
            <text:p>16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91" calcext:value-type="float">
            <text:p>191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-50" calcext:value-type="float">
            <text:p>-5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-1" calcext:value-type="float">
            <text:p>-1</text:p>
          </table:table-cell>
          <table:table-cell office:value-type="string" calcext:value-type="string">
            <text:p>UNUSED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hanron_14_003.dat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7" calcext:value-type="float">
            <text:p>157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NUSED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hanron_14_003.dat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40" calcext:value-type="float">
            <text:p>24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40" calcext:value-type="float">
            <text:p>24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57" calcext:value-type="float">
            <text:p>157</text:p>
          </table:table-cell>
          <table:table-cell table:style-name="ce12" office:value-type="float" office:value="157" calcext:value-type="float">
            <text:p>15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UNUSED – Silence mortals, Hajime is speaking</text:p>
          </table:table-cell>
        </table:table-row>
        <table:table-row table:style-name="ro2" table:number-rows-repeated="1048264">
          <table:table-cell table:number-columns-repeated="37"/>
        </table:table-row>
        <table:table-row table:style-name="ro2">
          <table:table-cell table:number-columns-repeated="37"/>
        </table:table-row>
      </table:table>
      <table:named-expressions/>
      <table:database-ranges>
        <table:database-range table:name="__Anonymous_Sheet_DB__0" table:target-range-address="DR2_Results_hanron.A1:DR2_Results_hanron.AJ31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o" fo:country="R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P0" style:volatile="true">
      <number:number number:decimal-places="0" number:min-decimal-places="0" number:min-integer-digits="1"/>
    </number:number-style>
    <number:number-style style:name="N115">
      <style:text-properties fo:color="#ff0000"/>
      <number:text>-</number:text>
      <number:number number:decimal-places="0" number:min-decimal-places="0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08T18:23:29.966812326</dc:date>
    <meta:editing-duration>PT21M6S</meta:editing-duration>
    <meta:editing-cycles>10</meta:editing-cycles>
    <meta:generator>LibreOffice/26.2.1.2$Linux_X86_64 LibreOffice_project/8399f6259d8c87f40e7255cdb3c9b958f5e08948</meta:generator>
    <meta:document-statistic meta:table-count="1" meta:cell-count="11246" meta:object-count="0"/>
  </office:meta>
</office:document-meta>
</file>